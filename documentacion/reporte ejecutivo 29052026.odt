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officeooo:rsid="0014d87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porte Ejecutivo Semanal</text:h>
      <text:p text:style-name="Text_20_body"><text:span text:style-name="T1">Periodo:</text:span> Lunes <text:span text:style-name="T2">25</text:span> al Viernes <text:span text:style-name="T2">29</text:span> de mayo de 2026</text:p>
      <text:p text:style-name="Text_20_body"><text:span text:style-name="T1">Área / Proyecto:</text:span> Infraestructura y Sistema Okip University</text:p>
      <text:p text:style-name="Text_20_body"><text:span text:style-name="T1">Elaborado por:</text:span> <text:span text:style-name="T2">Victor Javier Otero Vizcayno / Desarrollo e innovacion (backend)</text:span></text:p>
      <text:h text:style-name="Heading_20_3" text:outline-level="3">Resumen Ejecutivo</text:h>
      <text:p text:style-name="Text_20_body">Durante la presente semana, las operaciones se centraron en tres pilares fundamentales: la gestión de infraestructura interna, el fortalecimiento de la seguridad (hardening) de los servidores y el inicio de la modernización de la plataforma educativa. Las acciones tomadas apuntan a mejorar la estabilidad del sistema y lograr una mayor independencia tecnológica frente a proveedores externos.</text:p>
      <text:h text:style-name="Heading_20_3" text:outline-level="3">1. Gestión de Infraestructura y Seguridad</text:h>
      <text:list text:style-name="L1">
        <text:list-item>
          <text:p text:style-name="P1"><text:span text:style-name="T1">Asignación de Recursos:</text:span> Se gestionó y formalizó la solicitud de espacio dentro del servidor empresarial para soportar los nuevos requerimientos del entorno.</text:p>
        </text:list-item>
        <text:list-item>
          <text:p text:style-name="P1"><text:span text:style-name="T1">Auditoría y Hardening:</text:span> Se llevó a cabo una auditoría de seguridad automatizada utilizando la herramienta de escaneo <text:span text:style-name="T1">Lynis</text:span>. Con base en los hallazgos, se aplicó una configuración de seguridad base para fortalecer y proteger el entorno del servidor contra posibles vulnerabilidades.</text:p>
        </text:list-item>
      </text:list>
      <text:h text:style-name="Heading_20_3" text:outline-level="3">2. Actualización y Soberanía de Okip University</text:h>
      <text:list text:style-name="L2">
        <text:list-item>
          <text:p text:style-name="P2"><text:span text:style-name="T1">Upgrade del LMS:</text:span> Se iniciaron los trabajos de preparación para la actualización mayor de la plataforma Moodle, proyectando la transición de la versión <text:span text:style-name="T1">4.5 a la 5.2</text:span>.</text:p>
        </text:list-item>
        <text:list-item>
          <text:p text:style-name="P2"><text:span text:style-name="T1">Independencia de Proveedor (Bitnami):</text:span> Se está trabajando en la reestructuración del despliegue del sistema para desvincular Okip University de la infraestructura proporcionada por Bitnami. El objetivo en curso es la creación y apropiación de una "imagen" propia del sistema, lo cual nos otorgará control total sobre la ejecución, personalización y portabilidad del entorno.</text:p>
        </text:list-item>
      </text:list>
      <text:h text:style-name="Heading_20_3" text:outline-level="3">Próximos Pasos (En curso)</text:h>
      <text:list text:style-name="L3">
        <text:list-item>
          <text:p text:style-name="P3">Finalizar las pruebas de compatibilidad para la actualización de Moodle a la versión 5.2.</text:p>
        </text:list-item>
        <text:list-item>
          <text:p text:style-name="P3">Concluir el empaquetado de la imagen independiente del sistema para su próximo despliegue en el servidor empresarial asignado.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11:15:31.065418033</meta:creation-date>
    <dc:date>2026-05-29T11:57:20.360790362</dc:date>
    <meta:editing-duration>PT41M49S</meta:editing-duration>
    <meta:editing-cycles>1</meta:editing-cycles>
    <meta:document-statistic meta:table-count="0" meta:image-count="0" meta:object-count="0" meta:page-count="1" meta:paragraph-count="15" meta:word-count="288" meta:character-count="1926" meta:non-whitespace-character-count="1659"/>
    <meta:generator>LibreOffice/24.2.7.2$Linux_X86_64 LibreOffice_project/420$Build-2</meta:generator>
  </office:meta>
</office:document-meta>
</file>